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10000027EDEB4DC649B0C9A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4.785cm"/>
    </style:style>
    <style:style style:name="Tabella1.B" style:family="table-column">
      <style:table-column-properties style:column-width="5.38cm"/>
    </style:style>
    <style:style style:name="Tabella1.C" style:family="table-column">
      <style:table-column-properties style:column-width="6.835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/>
    </style:style>
    <style:style style:name="Tabella2.A" style:family="table-column">
      <style:table-column-properties style:column-width="5.293cm"/>
    </style:style>
    <style:style style:name="Tabella2.B" style:family="table-column">
      <style:table-column-properties style:column-width="4.122cm"/>
    </style:style>
    <style:style style:name="Tabella2.C" style:family="table-column">
      <style:table-column-properties style:column-width="7.585cm"/>
    </style:style>
    <style:style style:name="Tabella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  <style:text-properties officeooo:paragraph-rsid="000404e1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0404e1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weight="bold"/>
    </style:style>
    <style:style style:name="P6" style:family="paragraph" style:parent-style-name="Text_20_body" style:list-style-name="L5">
      <style:text-properties fo:font-weight="bold"/>
    </style:style>
    <style:style style:name="P7" style:family="paragraph" style:parent-style-name="Text_20_body" style:list-style-name="L6">
      <style:text-properties fo:font-weight="bold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left="0cm" fo:margin-right="0cm" fo:text-indent="0cm" style:auto-text-indent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lugin per RPG Maker MZ (<text:span text:style-name="Source_20_Text">MultiplayerSystem.js</text:span>) si occupa di connettersi al server, inviare gli aggiornamenti del giocatore locale e rappresentare visivamente gli altri giocatori e le loro azioni sulla mappa.<draw:frame draw:style-name="fr1" draw:name="Immagine1" text:anchor-type="char" svg:width="17cm" svg:height="13.275cm" draw:z-index="0"><draw:image xlink:href="Pictures/10000001000003310000027EDEB4DC649B0C9AB3.png" xlink:type="simple" xlink:show="embed" xlink:actuate="onLoad" draw:mime-type="image/png"/></draw:frame></text:p>
      <text:h text:style-name="Heading_20_3" text:outline-level="3">2. Caratteristiche Principali</text:h>
      <text:list text:style-name="L1">
        <text:list-item>
          <text:p text:style-name="P4"><text:span text:style-name="T1">Architettura Centralizzata:</text:span> Un unico server gestisce la logica, garantendo coerenza tra tutti i client e prevenendo il cheating.</text:p>
        </text:list-item>
        <text:list-item>
          <text:p text:style-name="P4"><text:span text:style-name="T1">Sincronizzazione dello Stato:</text:span> Sincronizza la posizione dei giocatori, i movimenti, l'aspetto, gli Switch, le Variabili e gli Self-Switch di gioco.</text:p>
        </text:list-item>
        <text:list-item>
          <text:p text:style-name="P5">Sistema di Party Completo:</text:p>
          <text:list>
            <text:list-item>
              <text:p text:style-name="P4">I giocatori possono creare e unirsi a party fino a 4 membri.</text:p>
            </text:list-item>
            <text:list-item>
              <text:p text:style-name="P4">Sistema di inviti per reclutare altri giocatori.</text:p>
            </text:list-item>
            <text:list-item>
              <text:p text:style-name="P4">Un leader del party gestisce il gruppo. Se il leader esce, un nuovo leader viene assegnato automaticamente.</text:p>
            </text:list-item>
          </text:list>
        </text:list-item>
        <text:list-item>
          <text:p text:style-name="P4"><text:span text:style-name="T1">Teletrasporto di Gruppo:</text:span> Quando il leader del party si trasferisce su un'altra mappa, tutti i membri del party vengono automaticamente teletrasportati nella sua nuova posizione.</text:p>
        </text:list-item>
        <text:list-item>
          <text:p text:style-name="P5">Interfaccia Utente Integrata:</text:p>
          <text:list>
            <text:list-item>
              <text:p text:style-name="P4">Un menu "Multiplayer" per connettersi, disconnettersi e gestire il party.</text:p>
            </text:list-item>
            <text:list-item>
              <text:p text:style-name="P4"><text:soft-page-break/>Un HUD su mappa che mostra i membri del party o i giocatori vicini.</text:p>
            </text:list-item>
            <text:list-item>
              <text:p text:style-name="P4">Finestre di notifica per gli inviti al party.</text:p>
            </text:list-item>
          </text:list>
        </text:list-item>
        <text:list-item>
          <text:p text:style-name="P4"><text:span text:style-name="T1">Gestione della Disconnessione:</text:span> Gestisce correttamente la disconnessione dei giocatori, rimuovendoli dal mondo di gioco e dai loro party.</text:p>
        </text:list-item>
        <text:list-item>
          <text:p text:style-name="P4">** targhette con nome (Nameplates):** Mostra i nomi dei giocatori sopra i loro sprite per una facile identificazione.</text:p>
        </text:list-item>
      </text:list>
      <text:h text:style-name="Heading_20_3" text:outline-level="3">3. Architettura</text:h>
      <text:p text:style-name="Text_20_body">Il sistema si basa su due componenti principali:</text:p>
      <text:list text:style-name="L2">
        <text:list-item>
          <text:p text:style-name="P8"><text:span text:style-name="T1">Il Server (</text:span><text:span text:style-name="Source_20_Text"><text:span text:style-name="T1">server.js</text:span></text:span><text:span text:style-name="T1">):</text:span></text:p>
          <text:list>
            <text:list-item>
              <text:p text:style-name="P8">È un'applicazione Node.js che utilizza il protocollo WebSocket per la comunicazione in tempo reale.</text:p>
            </text:list-item>
            <text:list-item>
              <text:p text:style-name="P8">Mantiene uno stato autorevole del gioco, che include la posizione di tutti i giocatori, lo stato dei party e i valori di Switch e Variabili globali.</text:p>
            </text:list-item>
            <text:list-item>
              <text:p text:style-name="P8">Riceve messaggi dai client (es. movimento del giocatore), aggiorna il suo stato e trasmette (broadcast) le modifiche a tutti gli altri client pertinenti.</text:p>
            </text:list-item>
            <text:list-item>
              <text:p text:style-name="P8">Gestisce tutta la logica dei party (creazione, inviti, unione, abbandono, cambio leader).</text:p>
            </text:list-item>
          </text:list>
        </text:list-item>
        <text:list-item>
          <text:p text:style-name="P8"><text:span text:style-name="T1">Il Client (</text:span><text:span text:style-name="Source_20_Text"><text:span text:style-name="T1">MultiplayerSystem.js</text:span></text:span><text:span text:style-name="T1">):</text:span></text:p>
          <text:list>
            <text:list-item>
              <text:p text:style-name="P8">È un plugin di RPG Maker MZ che si integra nel motore di gioco.</text:p>
            </text:list-item>
            <text:list-item>
              <text:p text:style-name="P8">Stabilisce una connessione WebSocket con il server.</text:p>
            </text:list-item>
            <text:list-item>
              <text:p text:style-name="P8">Invia periodicamente gli aggiornamenti del giocatore locale (posizione, aspetto) al server.</text:p>
            </text:list-item>
            <text:list-item>
              <text:p text:style-name="P8">Invia le modifiche a Switch e Variabili al server.</text:p>
            </text:list-item>
            <text:list-item>
              <text:p text:style-name="P8">Riceve aggiornamenti dal server e li applica localmente:</text:p>
              <text:list>
                <text:list-item>
                  <text:p text:style-name="P8">Crea o sposta gli sprite degli altri giocatori sulla mappa.</text:p>
                </text:list-item>
                <text:list-item>
                  <text:p text:style-name="P8">Aggiorna i valori di Switch e Variabili.</text:p>
                </text:list-item>
                <text:list-item>
                  <text:p text:style-name="P8">Gestisce le interazioni dell'interfaccia utente per il sistema di party.</text:p>
                </text:list-item>
              </text:list>
            </text:list-item>
          </text:list>
        </text:list-item>
      </text:list>
      <text:h text:style-name="Heading_20_3" text:outline-level="3">4. Installazione e Configurazione</text:h>
      <text:p text:style-name="Text_20_body">Per far funzionare il sistema, è necessario configurare sia il server che il client.</text:p>
      <text:h text:style-name="Heading_20_4" text:outline-level="4">4.1. Configurazione del Server</text:h>
      <text:p text:style-name="Text_20_body">Il server è progettato per essere eseguito in un ambiente Node.js.</text:p>
      <text:list text:style-name="L3">
        <text:list-item>
          <text:p text:style-name="P9"><text:span text:style-name="T1">Prerequisiti:</text:span> Assicurati di avere <text:a xlink:type="simple" xlink:href="https://nodejs.org/" office:target-frame-name="_blank" xlink:show="new" text:style-name="Internet_20_link" text:visited-style-name="Visited_20_Internet_20_Link">Node.js</text:a> installato.</text:p>
        </text:list-item>
        <text:list-item>
          <text:p text:style-name="P9"><text:soft-page-break/><text:span text:style-name="T1">Installazione Dipendenze:</text:span> Salva il file <text:span text:style-name="Source_20_Text">server.js</text:span> in una cartella. Apri un terminale o un prompt dei comandi in quella cartella ed esegui il seguente comando per installare la libreria WebSocket (<text:span text:style-name="Source_20_Text">ws</text:span>):</text:p>
          <text:p text:style-name="P10">Bash</text:p>
        </text:list-item>
      </text:list>
      <text:p text:style-name="P3">npm install ws</text:p>
      <text:p text:style-name="P3"><text:s/><text:span text:style-name="T1">Avvio del Server:</text:span> Per avviare il server in locale (per test), esegui: </text:p>
      <text:p text:style-name="P3">node server.js</text:p>
      <text:p text:style-name="P3"/>
      <text:p text:style-name="P3">default, il server si avvierà sulla porta <text:span text:style-name="Source_20_Text">8080</text:span>.</text:p>
      <text:list text:style-name="L4">
        <text:list-item>
          <text:p text:style-name="P11"><text:span text:style-name="T1">Deployment Online:</text:span> Per rendere il server accessibile a tutti, devi distribuirlo su un servizio di hosting come <text:a xlink:type="simple" xlink:href="https://render.com/" office:target-frame-name="_blank" xlink:show="new" text:style-name="Internet_20_link" text:visited-style-name="Visited_20_Internet_20_Link">Render.com</text:a>, Heroku o un VPS. Il codice è già predisposto per utilizzare la porta fornita dall'ambiente di hosting (<text:span text:style-name="Source_20_Text">process.env.PORT</text:span>).</text:p>
        </text:list-item>
      </text:list>
      <text:h text:style-name="Heading_20_4" text:outline-level="4">4.2. Configurazione del Client (RPG Maker MZ)</text:h>
      <text:list text:style-name="L5">
        <text:list-item>
          <text:p text:style-name="P6">Installazione del Plugin:</text:p>
          <text:list>
            <text:list-item>
              <text:p text:style-name="P12">Salva il file <text:span text:style-name="Source_20_Text">MultiplayerSystem.js</text:span> nella cartella <text:span text:style-name="Source_20_Text">/js/plugins/</text:span> del tuo progetto RPG Maker.</text:p>
            </text:list-item>
            <text:list-item>
              <text:p text:style-name="P12">Apri il Gestore Plugin nel tuo progetto, aggiungi un nuovo plugin e seleziona <text:span text:style-name="Source_20_Text">MultiplayerSystem</text:span> dalla lista.</text:p>
            </text:list-item>
          </text:list>
        </text:list-item>
        <text:list-item>
          <text:p text:style-name="P6">Creazione degli Eventi Giocatore:</text:p>
          <text:list>
            <text:list-item>
              <text:p text:style-name="P12">Questo è un passaggio <text:span text:style-name="T1">fondamentale</text:span>. Il plugin non crea nuovi sprite dal nulla; riutilizza eventi esistenti sulla mappa come "corpi" per gli altri giocatori.</text:p>
            </text:list-item>
            <text:list-item>
              <text:p text:style-name="P12">Su ogni mappa dove vuoi che appaiano altri giocatori, devi creare un numero di eventi chiamati <text:span text:style-name="Source_20_Text">Player1</text:span>, <text:span text:style-name="Source_20_Text">Player2</text:span>, <text:span text:style-name="Source_20_Text">Player3</text:span>, ecc. (fino a un massimo di 8 per mappa, come definito nel codice).</text:p>
            </text:list-item>
            <text:list-item>
              <text:p text:style-name="P12">Questi eventi possono essere vuoti. Il plugin li controllerà, cambierà il loro aspetto e li sposterà per rappresentare i giocatori remoti.</text:p>
            </text:list-item>
          </text:list>
        </text:list-item>
        <text:list-item>
          <text:p text:style-name="P6">Configurazione dei Parametri del Plugin:</text:p>
          <text:list>
            <text:list-item>
              <text:p text:style-name="P12"><text:span text:style-name="Source_20_Text"><text:span text:style-name="T1">Server URL</text:span></text:span>: L'indirizzo del tuo server WebSocket.</text:p>
              <text:list>
                <text:list-item>
                  <text:p text:style-name="P12">Per test locali: <text:span text:style-name="Source_20_Text">ws://localhost:8080</text:span></text:p>
                </text:list-item>
                <text:list-item>
                  <text:p text:style-name="P12">Per un server online: <text:span text:style-name="Source_20_Text">wss://tuo-server-online.onrender.com</text:span> (nota l'uso di <text:span text:style-name="Source_20_Text">wss</text:span> per connessioni sicure).</text:p>
                </text:list-item>
              </text:list>
            </text:list-item>
            <text:list-item>
              <text:p text:style-name="P12"><text:span text:style-name="Source_20_Text"><text:span text:style-name="T1">Maximum Players</text:span></text:span>: Il numero massimo di giocatori che il server può accettare. Deve corrispondere alla logica del server, se presente. (Default: 50).</text:p>
            </text:list-item>
            <text:list-item>
              <text:p text:style-name="P12"><text:soft-page-break/><text:span text:style-name="Source_20_Text"><text:span text:style-name="T1">Excluded Switches</text:span></text:span><text:span text:style-name="T1"> / </text:span><text:span text:style-name="Source_20_Text"><text:span text:style-name="T1">Excluded Variables</text:span></text:span>: Liste separate da virgole di ID di Switch e Variabili che NON devono essere sincronizzati. Utile per elementi specifici del client (es. controllo del volume).</text:p>
            </text:list-item>
            <text:list-item>
              <text:p text:style-name="P12"><text:span text:style-name="Source_20_Text"><text:span text:style-name="T1">Show Player Names</text:span></text:span>: Se <text:span text:style-name="Source_20_Text">true</text:span>, mostra il nome del giocatore sopra il suo sprite.</text:p>
            </text:list-item>
            <text:list-item>
              <text:p text:style-name="P12"><text:span text:style-name="Source_20_Text"><text:span text:style-name="T1">Nameplate Config</text:span></text:span>: Un oggetto di configurazione per personalizzare l'aspetto delle targhette con il nome (font, dimensione, colore, ecc.).</text:p>
            </text:list-item>
          </text:list>
        </text:list-item>
      </text:list>
      <text:h text:style-name="Heading_20_3" text:outline-level="3">5. Guida all'Uso (per il Giocatore)</text:h>
      <text:p text:style-name="Text_20_body">Una volta configurato, ecco come i giocatori interagiranno con il sistema.</text:p>
      <text:list text:style-name="L6">
        <text:list-item>
          <text:p text:style-name="P7">Connessione:</text:p>
          <text:list>
            <text:list-item>
              <text:p text:style-name="P13">Dal menu principale del gioco, il giocatore può selezionare "Multiplayer".</text:p>
            </text:list-item>
            <text:list-item>
              <text:p text:style-name="P13">Si aprirà una scena dove potrà inserire l'URL del server e premere "Connect".</text:p>
            </text:list-item>
            <text:list-item>
              <text:p text:style-name="P13">Se la connessione ha successo, verrà riportato alla mappa e sarà online.</text:p>
            </text:list-item>
          </text:list>
        </text:list-item>
        <text:list-item>
          <text:p text:style-name="P7">Sistema di Party:</text:p>
          <text:list>
            <text:list-item>
              <text:p text:style-name="P13"><text:span text:style-name="T1">Invitare:</text:span> Nel menu "Multiplayer", c'è un'opzione "Player List". Da qui, un giocatore può selezionare un altro giocatore online (che non sia già nel suo party) per inviarlo a un party.</text:p>
            </text:list-item>
            <text:list-item>
              <text:p text:style-name="P13"><text:span text:style-name="T1">Ricevere Inviti:</text:span> Il giocatore invitato riceverà una notifica a comparsa sullo schermo con i pulsanti "Accept" e "Decline".</text:p>
            </text:list-item>
            <text:list-item>
              <text:p text:style-name="P13"><text:span text:style-name="T1">Gestione del Party:</text:span> Nel menu "Multiplayer", l'opzione "Party Menu" mostra i membri del party attuale e fornisce un pulsante per "Leave Party".</text:p>
            </text:list-item>
            <text:list-item>
              <text:p text:style-name="P13"><text:span text:style-name="T1">Funzionalità del Leader:</text:span> Se il leader del party cambia mappa, tutti gli altri membri vengono forzatamente teletrasportati da lui. Se il leader lascia il party, il primo membro che si è unito diventa il nuovo leader. Se l'ultimo membro lascia, il party viene sciolto.</text:p>
            </text:list-item>
          </text:list>
        </text:list-item>
        <text:list-item>
          <text:p text:style-name="P7">HUD su Mappa:</text:p>
          <text:list>
            <text:list-item>
              <text:p text:style-name="P13">Durante il gioco, un piccolo pannello sullo schermo (<text:span text:style-name="Source_20_Text">Window_PlayerList</text:span>) mostra un elenco di giocatori.</text:p>
            </text:list-item>
            <text:list-item>
              <text:p text:style-name="P13">Se il giocatore è in un party, mostra tutti i membri del party, indipendentemente dalla mappa in cui si trovano.</text:p>
            </text:list-item>
            <text:list-item>
              <text:p text:style-name="P13">Se il giocatore non è in un party, mostra gli altri giocatori presenti sulla stessa mappa.</text:p>
            </text:list-item>
          </text:list>
        </text:list-item>
      </text:list>
      <text:h text:style-name="Heading_20_3" text:outline-level="3">6. Dettagli Tecnici: Protocollo di Comunicazione</text:h>
      <text:p text:style-name="Text_20_body">Questa è una sintesi dei messaggi scambiati tra client e server.</text:p>
      <text:h text:style-name="Heading_20_4" text:outline-level="4">Dal Client al Server (<text:span text:style-name="Source_20_Text">Client -&gt; Server</text:span>)</text:h>
      <text:p text:style-name="P3"/>
      <text:p text:style-name="P3"/>
      <text:h text:style-name="P2" text:outline-level="4"><text:soft-page-break/>Dal Client al Server (<text:span text:style-name="Source_20_Text">Client -&gt; Server</text:span>)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Contents">Tipo Messaggio</text:p>
            </table:table-cell>
            <table:table-cell table:style-name="Tabella1.A1" office:value-type="string">
              <text:p text:style-name="Table_20_Contents">Dati (Payload)</text:p>
            </table:table-cell>
            <table:table-cell table:style-name="Tabella1.A1" office:value-type="string">
              <text:p text:style-name="Table_20_Contents">Descrizione</text:p>
            </table:table-cell>
          </table:table-row>
        </table:table-header-rows>
        <table:table-row>
          <table:table-cell table:style-name="Tabella1.A1" office:value-type="string">
            <text:p text:style-name="Table_20_Contents"><text:span text:style-name="Source_20_Text">login</text:span></text:p>
          </table:table-cell>
          <table:table-cell table:style-name="Tabella1.A1" office:value-type="string">
            <text:p text:style-name="Table_20_Contents"><text:span text:style-name="Source_20_Text">{ playerInfo: Object }</text:span></text:p>
          </table:table-cell>
          <table:table-cell table:style-name="Tabella1.A1" office:value-type="string">
            <text:p text:style-name="Table_20_Contents">Inviato alla connessione. <text:span text:style-name="Source_20_Text">playerInfo</text:span> contiene nome, aspetto, posizione iniziale.</text:p>
          </table:table-cell>
        </table:table-row>
        <table:table-row>
          <table:table-cell table:style-name="Tabella1.A1" office:value-type="string">
            <text:p text:style-name="Table_20_Contents"><text:span text:style-name="Source_20_Text">player-move</text:span></text:p>
          </table:table-cell>
          <table:table-cell table:style-name="Tabella1.A1" office:value-type="string">
            <text:p text:style-name="Table_20_Contents"><text:span text:style-name="Source_20_Text">{ x, y, direction, ... }</text:span></text:p>
          </table:table-cell>
          <table:table-cell table:style-name="Tabella1.A1" office:value-type="string">
            <text:p text:style-name="Table_20_Contents">Inviato quando il giocatore si muove.</text:p>
          </table:table-cell>
        </table:table-row>
        <table:table-row>
          <table:table-cell table:style-name="Tabella1.A1" office:value-type="string">
            <text:p text:style-name="Table_20_Contents"><text:span text:style-name="Source_20_Text">player-meta</text:span></text:p>
          </table:table-cell>
          <table:table-cell table:style-name="Tabella1.A1" office:value-type="string">
            <text:p text:style-name="Table_20_Contents"><text:span text:style-name="Source_20_Text">{ info: Object }</text:span></text:p>
          </table:table-cell>
          <table:table-cell table:style-name="Tabella1.A1" office:value-type="string">
            <text:p text:style-name="Table_20_Contents">Inviato quando l'aspetto del giocatore cambia (es. cambio di equipaggiamento).</text:p>
          </table:table-cell>
        </table:table-row>
        <table:table-row>
          <table:table-cell table:style-name="Tabella1.A1" office:value-type="string">
            <text:p text:style-name="Table_20_Contents"><text:span text:style-name="Source_20_Text">map-transfer</text:span></text:p>
          </table:table-cell>
          <table:table-cell table:style-name="Tabella1.A1" office:value-type="string">
            <text:p text:style-name="Table_20_Contents"><text:span text:style-name="Source_20_Text">{ mapId: number }</text:span></text:p>
          </table:table-cell>
          <table:table-cell table:style-name="Tabella1.A1" office:value-type="string">
            <text:p text:style-name="Table_20_Contents">Inviato quando il giocatore cambia mappa.</text:p>
          </table:table-cell>
        </table:table-row>
        <table:table-row>
          <table:table-cell table:style-name="Tabella1.A1" office:value-type="string">
            <text:p text:style-name="Table_20_Contents"><text:span text:style-name="Source_20_Text">switch-change</text:span></text:p>
          </table:table-cell>
          <table:table-cell table:style-name="Tabella1.A1" office:value-type="string">
            <text:p text:style-name="Table_20_Contents"><text:span text:style-name="Source_20_Text">{ id: number, value: boolean }</text:span></text:p>
          </table:table-cell>
          <table:table-cell table:style-name="Tabella1.A1" office:value-type="string">
            <text:p text:style-name="Table_20_Contents">Inviato quando un Switch sincronizzato cambia valore.</text:p>
          </table:table-cell>
        </table:table-row>
        <table:table-row>
          <table:table-cell table:style-name="Tabella1.A1" office:value-type="string">
            <text:p text:style-name="Table_20_Contents"><text:span text:style-name="Source_20_Text">variable-change</text:span></text:p>
          </table:table-cell>
          <table:table-cell table:style-name="Tabella1.A1" office:value-type="string">
            <text:p text:style-name="Table_20_Contents"><text:span text:style-name="Source_20_Text">{ id: number, value: any }</text:span></text:p>
          </table:table-cell>
          <table:table-cell table:style-name="Tabella1.A1" office:value-type="string">
            <text:p text:style-name="Table_20_Contents">Inviato quando una Variabile sincronizzata cambia valore.</text:p>
          </table:table-cell>
        </table:table-row>
        <table:table-row>
          <table:table-cell table:style-name="Tabella1.A1" office:value-type="string">
            <text:p text:style-name="Table_20_Contents"><text:span text:style-name="Source_20_Text">self-switch-change</text:span></text:p>
          </table:table-cell>
          <table:table-cell table:style-name="Tabella1.A1" office:value-type="string">
            <text:p text:style-name="Table_20_Contents"><text:span text:style-name="Source_20_Text">{ mapId, eventId, switchType, value }</text:span></text:p>
          </table:table-cell>
          <table:table-cell table:style-name="Tabella1.A1" office:value-type="string">
            <text:p text:style-name="Table_20_Contents">Inviato quando un Self-Switch cambia.</text:p>
          </table:table-cell>
        </table:table-row>
        <table:table-row>
          <table:table-cell table:style-name="Tabella1.A1" office:value-type="string">
            <text:p text:style-name="Table_20_Contents"><text:span text:style-name="Source_20_Text">party-invite</text:span></text:p>
          </table:table-cell>
          <table:table-cell table:style-name="Tabella1.A1" office:value-type="string">
            <text:p text:style-name="Table_20_Contents"><text:span text:style-name="Source_20_Text">{ targetId: number }</text:span></text:p>
          </table:table-cell>
          <table:table-cell table:style-name="Tabella1.A1" office:value-type="string">
            <text:p text:style-name="Table_20_Contents">Richiesta di invitare un altro giocatore nel party.</text:p>
          </table:table-cell>
        </table:table-row>
        <table:table-row>
          <table:table-cell table:style-name="Tabella1.A1" office:value-type="string">
            <text:p text:style-name="Table_20_Contents"><text:span text:style-name="Source_20_Text">party-accept</text:span></text:p>
          </table:table-cell>
          <table:table-cell table:style-name="Tabella1.A1" office:value-type="string">
            <text:p text:style-name="Table_20_Contents"><text:span text:style-name="Source_20_Text">{ inviterId: number }</text:span></text:p>
          </table:table-cell>
          <table:table-cell table:style-name="Tabella1.A1" office:value-type="string">
            <text:p text:style-name="Table_20_Contents">Accettazione di un invito al party ricevuto.</text:p>
          </table:table-cell>
        </table:table-row>
        <table:table-row>
          <table:table-cell table:style-name="Tabella1.A1" office:value-type="string">
            <text:p text:style-name="Table_20_Contents"><text:span text:style-name="Source_20_Text">party-leave</text:span></text:p>
          </table:table-cell>
          <table:table-cell table:style-name="Tabella1.A1" office:value-type="string">
            <text:p text:style-name="Table_20_Contents">(Nessuno)</text:p>
          </table:table-cell>
          <table:table-cell table:style-name="Tabella1.A1" office:value-type="string">
            <text:p text:style-name="Table_20_Contents">Notifica al server che il giocatore vuole lasciare il suo party.</text:p>
          </table:table-cell>
        </table:table-row>
      </table:table>
      <text:p text:style-name="P3"/>
      <text:p text:style-name="P3"/>
      <text:h text:style-name="Heading_20_4" text:outline-level="4">Dal Server al Client (<text:span text:style-name="Source_20_Text">Server -&gt; Client</text:span>)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Table_20_Contents">Tipo Messaggio</text:p>
            </table:table-cell>
            <table:table-cell table:style-name="Tabella2.A1" office:value-type="string">
              <text:p text:style-name="Table_20_Contents">Dati (Payload)</text:p>
            </table:table-cell>
            <table:table-cell table:style-name="Tabella2.A1" office:value-type="string">
              <text:p text:style-name="Table_20_Contents">Descrizione</text:p>
            </table:table-cell>
          </table:table-row>
        </table:table-header-rows>
        <table:table-row>
          <table:table-cell table:style-name="Tabella2.A1" office:value-type="string">
            <text:p text:style-name="Table_20_Contents"><text:span text:style-name="Source_20_Text">login-success</text:span></text:p>
          </table:table-cell>
          <table:table-cell table:style-name="Tabella2.A1" office:value-type="string">
            <text:p text:style-name="Table_20_Contents"><text:span text:style-name="Source_20_Text">{ yourId, gameState, players }</text:span></text:p>
          </table:table-cell>
          <table:table-cell table:style-name="Tabella2.A1" office:value-type="string">
            <text:p text:style-name="Table_20_Contents">Risposta a un login riuscito. Fornisce l'ID univoco del giocatore, lo stato completo del gioco (switch/variabili) e l'elenco dei giocatori già connessi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player-joined</text:span></text:p>
          </table:table-cell>
          <table:table-cell table:style-name="Tabella2.A1" office:value-type="string">
            <text:p text:style-name="Table_20_Contents"><text:span text:style-name="Source_20_Text">{ playerId, playerInfo }</text:span></text:p>
          </table:table-cell>
          <table:table-cell table:style-name="Tabella2.A1" office:value-type="string">
            <text:p text:style-name="Table_20_Contents">Trasmesso a tutti quando un nuovo giocatore si connette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player-left</text:span></text:p>
          </table:table-cell>
          <table:table-cell table:style-name="Tabella2.A1" office:value-type="string">
            <text:p text:style-name="Table_20_Contents"><text:span text:style-name="Source_20_Text">{ playerId }</text:span></text:p>
          </table:table-cell>
          <table:table-cell table:style-name="Tabella2.A1" office:value-type="string">
            <text:p text:style-name="Table_20_Contents">Trasmesso a tutti quando un giocatore si disconnette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player-move</text:span></text:p>
          </table:table-cell>
          <table:table-cell table:style-name="Tabella2.A1" office:value-type="string">
            <text:p text:style-name="Table_20_Contents"><text:span text:style-name="Source_20_Text">{ from, x, y, direction, ... }</text:span></text:p>
          </table:table-cell>
          <table:table-cell table:style-name="Tabella2.A1" office:value-type="string">
            <text:p text:style-name="Table_20_Contents">Trasmesso a tutti (tranne l'originatore) per aggiornare la posizione di un giocatore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player-meta</text:span></text:p>
          </table:table-cell>
          <table:table-cell table:style-name="Tabella2.A1" office:value-type="string">
            <text:p text:style-name="Table_20_Contents"><text:span text:style-name="Source_20_Text">{ from, info }</text:span></text:p>
          </table:table-cell>
          <table:table-cell table:style-name="Tabella2.A1" office:value-type="string">
            <text:p text:style-name="Table_20_Contents">Trasmesso per aggiornare l'aspetto di un giocatore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map-transfer</text:span></text:p>
          </table:table-cell>
          <table:table-cell table:style-name="Tabella2.A1" office:value-type="string">
            <text:p text:style-name="Table_20_Contents"><text:span text:style-name="Source_20_Text">{ from, mapId }</text:span></text:p>
          </table:table-cell>
          <table:table-cell table:style-name="Tabella2.A1" office:value-type="string">
            <text:p text:style-name="Table_20_Contents">Trasmesso per notificare il cambio mappa di un giocatore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switch-change</text:span></text:p>
          </table:table-cell>
          <table:table-cell table:style-name="Tabella2.A1" office:value-type="string">
            <text:p text:style-name="Table_20_Contents"><text:span text:style-name="Source_20_Text">{ from, id, value }</text:span></text:p>
          </table:table-cell>
          <table:table-cell table:style-name="Tabella2.A1" office:value-type="string">
            <text:p text:style-name="Table_20_Contents">Trasmesso per sincronizzare un cambiamento di Switch.</text:p>
          </table:table-cell>
        </table:table-row>
        <text:soft-page-break/>
        <table:table-row>
          <table:table-cell table:style-name="Tabella2.A1" office:value-type="string">
            <text:p text:style-name="Table_20_Contents"><text:span text:style-name="Source_20_Text">variable-change</text:span></text:p>
          </table:table-cell>
          <table:table-cell table:style-name="Tabella2.A1" office:value-type="string">
            <text:p text:style-name="Table_20_Contents"><text:span text:style-name="Source_20_Text">{ from, id, value }</text:span></text:p>
          </table:table-cell>
          <table:table-cell table:style-name="Tabella2.A1" office:value-type="string">
            <text:p text:style-name="Table_20_Contents">Trasmesso per sincronizzare un cambiamento di Variabile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party-invite-request</text:span></text:p>
          </table:table-cell>
          <table:table-cell table:style-name="Tabella2.A1" office:value-type="string">
            <text:p text:style-name="Table_20_Contents"><text:span text:style-name="Source_20_Text">{ fromId, fromName }</text:span></text:p>
          </table:table-cell>
          <table:table-cell table:style-name="Tabella2.A1" office:value-type="string">
            <text:p text:style-name="Table_20_Contents">Inviato specificamente al giocatore invitato per mostrargli la notifica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party-update</text:span></text:p>
          </table:table-cell>
          <table:table-cell table:style-name="Tabella2.A1" office:value-type="string">
            <text:p text:style-name="Table_20_Contents"><text:span text:style-name="Source_20_Text">{ party: { leaderId, members } }</text:span></text:p>
          </table:table-cell>
          <table:table-cell table:style-name="Tabella2.A1" office:value-type="string">
            <text:p text:style-name="Table_20_Contents">Trasmesso a tutti i membri di un party quando la sua composizione cambia (nuovo membro, membro uscito, cambio leader)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party-disband</text:span></text:p>
          </table:table-cell>
          <table:table-cell table:style-name="Tabella2.A1" office:value-type="string">
            <text:p text:style-name="Table_20_Contents">(Nessuno)</text:p>
          </table:table-cell>
          <table:table-cell table:style-name="Tabella2.A1" office:value-type="string">
            <text:p text:style-name="Table_20_Contents">Inviato ai membri di un party quando questo viene sciolto (es. ultimo membro uscito)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force-teleport</text:span></text:p>
          </table:table-cell>
          <table:table-cell table:style-name="Tabella2.A1" office:value-type="string">
            <text:p text:style-name="Table_20_Contents"><text:span text:style-name="Source_20_Text">{ mapId, x, y, direction }</text:span></text:p>
          </table:table-cell>
          <table:table-cell table:style-name="Tabella2.A1" office:value-type="string">
            <text:p text:style-name="Table_20_Contents">Inviato ai membri di un party quando il leader cambia mappa, forzandoli a seguirlo.</text:p>
          </table:table-cell>
        </table:table-row>
        <table:table-row>
          <table:table-cell table:style-name="Tabella2.A1" office:value-type="string">
            <text:p text:style-name="Table_20_Contents"><text:span text:style-name="Source_20_Text">error</text:span></text:p>
          </table:table-cell>
          <table:table-cell table:style-name="Tabella2.A1" office:value-type="string">
            <text:p text:style-name="Table_20_Contents"><text:span text:style-name="Source_20_Text">{ message: string }</text:span></text:p>
          </table:table-cell>
          <table:table-cell table:style-name="Tabella2.A1" office:value-type="string">
            <text:p text:style-name="Table_20_Contents">Inviato a un giocatore specifico in caso di errore (es. party pieno, giocatore già in party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5T09:45:26.877000000</meta:creation-date>
    <dc:date>2025-10-07T22:07:40.932000000</dc:date>
    <meta:editing-duration>PT2M47S</meta:editing-duration>
    <meta:editing-cycles>5</meta:editing-cycles>
    <meta:generator>LibreOffice/7.6.2.1$Windows_X86_64 LibreOffice_project/56f7684011345957bbf33a7ee678afaf4d2ba333</meta:generator>
    <meta:document-statistic meta:table-count="2" meta:image-count="1" meta:object-count="0" meta:page-count="6" meta:paragraph-count="154" meta:word-count="1423" meta:character-count="9013" meta:non-whitespace-character-count="7800"/>
  </office:meta>
</office:document-meta>
</file>